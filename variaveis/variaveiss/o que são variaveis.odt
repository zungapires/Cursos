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1329BF237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3dc" officeooo:paragraph-rsid="000733dc"/>
    </style:style>
    <style:style style:name="P2" style:family="paragraph" style:parent-style-name="Standard">
      <style:text-properties officeooo:rsid="000733dc" officeooo:paragraph-rsid="00083e01"/>
    </style:style>
    <style:style style:name="P3" style:family="paragraph" style:parent-style-name="Standard">
      <style:text-properties officeooo:rsid="000733dc" officeooo:paragraph-rsid="0009331f"/>
    </style:style>
    <style:style style:name="P4" style:family="paragraph" style:parent-style-name="Standard">
      <style:text-properties fo:font-weight="bold" officeooo:rsid="000733dc" officeooo:paragraph-rsid="000733dc" style:font-weight-asian="bold" style:font-weight-complex="bold"/>
    </style:style>
    <style:style style:name="P5" style:family="paragraph" style:parent-style-name="Standard">
      <style:text-properties fo:font-weight="bold" officeooo:rsid="0009331f" officeooo:paragraph-rsid="0009331f" style:font-weight-asian="bold" style:font-weight-complex="bold"/>
    </style:style>
    <style:style style:name="P6" style:family="paragraph" style:parent-style-name="Standard">
      <style:text-properties officeooo:rsid="0009331f" officeooo:paragraph-rsid="0009331f"/>
    </style:style>
    <style:style style:name="P7" style:family="paragraph" style:parent-style-name="Standard">
      <style:text-properties fo:font-weight="bold" officeooo:rsid="000733dc" officeooo:paragraph-rsid="000733dc" style:font-weight-asian="bold" style:font-weight-complex="bold"/>
    </style:style>
    <style:style style:name="P8" style:family="paragraph" style:parent-style-name="Standard">
      <style:text-properties fo:font-weight="bold" officeooo:rsid="000a4112" officeooo:paragraph-rsid="000a4112" style:font-weight-asian="bold" style:font-weight-complex="bold"/>
    </style:style>
    <style:style style:name="P9" style:family="paragraph" style:parent-style-name="Standard">
      <style:text-properties fo:font-weight="bold" officeooo:rsid="000a4112" officeooo:paragraph-rsid="000b0efb" style:font-weight-asian="bold" style:font-weight-complex="bold"/>
    </style:style>
    <style:style style:name="P10" style:family="paragraph" style:parent-style-name="Standard">
      <style:text-properties fo:font-weight="normal" officeooo:rsid="000733dc" officeooo:paragraph-rsid="0009331f" style:font-weight-asian="normal" style:font-weight-complex="normal"/>
    </style:style>
    <style:style style:name="P11" style:family="paragraph" style:parent-style-name="Standard">
      <style:text-properties fo:font-weight="normal" officeooo:rsid="0009331f" officeooo:paragraph-rsid="0009331f" style:font-weight-asian="normal" style:font-weight-complex="normal"/>
    </style:style>
    <style:style style:name="P12" style:family="paragraph" style:parent-style-name="Standard">
      <style:text-properties fo:font-weight="normal" officeooo:rsid="000a4112" officeooo:paragraph-rsid="000a411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3e01" style:font-weight-asian="normal" style:font-weight-complex="normal"/>
    </style:style>
    <style:style style:name="T4" style:family="text">
      <style:text-properties fo:font-weight="normal" officeooo:rsid="0009331f" style:font-weight-asian="normal" style:font-weight-complex="normal"/>
    </style:style>
    <style:style style:name="T5" style:family="text">
      <style:text-properties fo:font-weight="normal" officeooo:rsid="000b1abf" style:font-weight-asian="normal" style:font-weight-complex="normal"/>
    </style:style>
    <style:style style:name="T6" style:family="text">
      <style:text-properties officeooo:rsid="00083e01"/>
    </style:style>
    <style:style style:name="T7" style:family="text">
      <style:text-properties officeooo:rsid="0009a37c"/>
    </style:style>
    <style:style style:name="T8" style:family="text">
      <style:text-properties officeooo:rsid="000b0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riaveis em php</text:p>
      <text:p text:style-name="P1"><text:line-break/><text:span text:style-name="T2">São dados armazenados mutáveis</text:span></text:p>
      <text:p text:style-name="P10">Podem ser substituidos</text:p>
      <text:p text:style-name="P11">Toda variável é guardada no servidor no php, </text:p>
      <text:p text:style-name="P11">porque é uma linguagem que roda no server side</text:p>
      <text:p text:style-name="P3"><text:span text:style-name="T4"/></text:p>
      <text:p text:style-name="P5">Regras <text:span text:style-name="T7">para nomeação</text:span></text:p>
      <text:p text:style-name="P11">Sempre começam com $(cifrão)</text:p>
      <text:p text:style-name="P11">o segundo pode serletra ou simbolo, ex underline(_),nunca um numero</text:p>
      <text:p text:style-name="P11">aceita caracteres de (a-z),(A-Z),(0-9) e (_)</text:p>
      <text:p text:style-name="P10"><text:line-break/>ex: $nome= “Zunga”; </text:p>
      <text:p text:style-name="P10"/>
      <text:p text:style-name="P8">tipos de variaveis escalares:</text:p>
      <text:p text:style-name="P8"/>
      <text:p text:style-name="P12"><text:span text:style-name="T1">String</text:span> sao sequencias de letras, números e símbolos , sempre representadas em aspas</text:p>
      <text:p text:style-name="P12">(ex:$nome=”silva”;)</text:p>
      <text:p text:style-name="P12"><text:s/></text:p>
      <text:p text:style-name="P8">Int ou integer:<text:span text:style-name="T2"> valor numérico inteiro, o que vem sem a parte decimal, não representados por aspas.(ex:$idade=34)</text:span></text:p>
      <text:p text:style-name="P8"><text:span text:style-name="T2"/></text:p>
      <text:p text:style-name="P8">Float <text:s/>ou double: <text:span text:style-name="T2">um valor numérico real, que vem com a parte decimal, depois do ponto flutuante(float).(ex: $peso=85.5).</text:span></text:p>
      <text:p text:style-name="P9"/>
      <text:p text:style-name="P9">Bool ou boolean: <text:span text:style-name="T2">valores logigicos, que aceita valores </text:span>true <text:span text:style-name="T2">ou </text:span><text:s/>false. <text:span text:style-name="T2">($casado= true), </text:span><text:span text:style-name="T5">para uma variável booolean, se der echo/print, o valor true=1 ou mais, e false = a um conjunto vazio ou 0</text:span></text:p>
      <text:p text:style-name="P8"><text:span text:style-name="T2"/></text:p>
      <text:p text:style-name="P12"><draw:frame draw:style-name="fr1" draw:name="Imagem1" text:anchor-type="char" svg:x="0.824cm" svg:y="0.048cm" svg:width="10.751cm" svg:height="6.414cm" draw:z-index="0"><draw:image xlink:href="Pictures/1000000100000201000001329BF23717.png" xlink:type="simple" xlink:show="embed" xlink:actuate="onLoad" draw:mime-type="image/png"/></draw:frame></text:p>
      <text:p text:style-name="P12"/>
      <text:p text:style-name="P12"/>
      <text:p text:style-name="P1"><text:span text:style-name="T2"/></text:p>
      <text:p text:style-name="P1"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stante</text:p>
      <text:p text:style-name="P2"><text:span text:style-name="T2">São dados armazenados </text:span><text:span text:style-name="T3">não</text:span><text:span text:style-name="T2"> mutáveis</text:span></text:p>
      <text:p text:style-name="P2"><text:span text:style-name="T6">não <text:s/></text:span>Podem ser substituidos</text:p>
      <text:p text:style-name="P6">ex: const curso=”php”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1T23:20:08.125600758</meta:creation-date>
    <dc:date>2026-06-24T08:29:55.950288968</dc:date>
    <meta:editing-duration>PT11H20M55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21" meta:word-count="153" meta:character-count="991" meta:non-whitespace-character-count="850"/>
  </office:meta>
</office:document-meta>
</file>